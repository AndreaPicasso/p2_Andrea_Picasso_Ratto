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tarSymbol" style:font-charset="x-symbol" svg:font-family="StarSymbol" style:font-family-generic="system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center"/>
      <style:text-properties fo:font-size="24pt" style:font-size-asian="24pt"/>
    </style:style>
    <style:style style:name="P2" style:parent-style-name="Textbody" style:family="paragraph">
      <style:paragraph-properties fo:text-align="center"/>
      <style:text-properties fo:font-size="24pt" style:font-size-asian="24pt"/>
    </style:style>
    <style:style style:name="P3" style:parent-style-name="Textbody" style:family="paragraph">
      <style:paragraph-properties fo:text-align="center"/>
      <style:text-properties fo:font-size="24pt" style:font-size-asian="24pt"/>
    </style:style>
    <style:style style:name="P4" style:parent-style-name="Textbody" style:family="paragraph">
      <style:paragraph-properties fo:text-align="center"/>
      <style:text-properties fo:font-size="24pt" style:font-size-asian="24pt"/>
    </style:style>
    <style:style style:name="P5" style:parent-style-name="Textbody" style:family="paragraph">
      <style:paragraph-properties fo:text-align="center"/>
      <style:text-properties fo:font-size="24pt" style:font-size-asian="24pt"/>
    </style:style>
    <style:style style:name="P6" style:parent-style-name="Textbody" style:family="paragraph">
      <style:paragraph-properties fo:text-align="center"/>
      <style:text-properties fo:font-size="24pt" style:font-size-asian="24pt"/>
    </style:style>
    <style:style style:name="P7" style:parent-style-name="Textbody" style:family="paragraph">
      <style:paragraph-properties fo:text-align="center"/>
      <style:text-properties fo:font-size="24pt" style:font-size-asian="24pt"/>
    </style:style>
    <style:style style:name="P8" style:parent-style-name="Textbody" style:family="paragraph">
      <style:paragraph-properties fo:text-align="center"/>
      <style:text-properties fo:font-size="24pt" style:font-size-asian="24pt"/>
    </style:style>
    <style:style style:name="P9" style:parent-style-name="Textbody" style:family="paragraph">
      <style:paragraph-properties fo:text-align="center"/>
      <style:text-properties fo:font-size="24pt" style:font-size-asian="24pt"/>
    </style:style>
    <style:style style:name="P10" style:parent-style-name="Textbody" style:family="paragraph">
      <style:paragraph-properties fo:text-align="center"/>
      <style:text-properties fo:font-size="24pt" style:font-size-asian="24pt"/>
    </style:style>
    <style:style style:name="P11" style:parent-style-name="Textbody" style:family="paragraph">
      <style:paragraph-properties fo:text-align="center"/>
      <style:text-properties fo:font-size="24pt" style:font-size-asian="24pt"/>
    </style:style>
    <style:style style:name="P12" style:parent-style-name="Textbody" style:family="paragraph">
      <style:paragraph-properties fo:text-align="center"/>
      <style:text-properties fo:font-size="24pt" style:font-size-asian="24pt"/>
    </style:style>
    <style:style style:name="P13" style:parent-style-name="Textbody" style:family="paragraph">
      <style:paragraph-properties fo:text-align="center"/>
      <style:text-properties fo:font-size="24pt" style:font-size-asian="24pt"/>
    </style:style>
    <style:style style:name="P14" style:parent-style-name="Textbody" style:family="paragraph">
      <style:paragraph-properties fo:text-align="center"/>
      <style:text-properties fo:font-size="24pt" style:font-size-asian="24pt"/>
    </style:style>
    <style:style style:name="P15" style:parent-style-name="Textbody" style:family="paragraph">
      <style:paragraph-properties fo:text-align="center"/>
      <style:text-properties fo:font-size="24pt" style:font-size-asian="24pt"/>
    </style:style>
    <style:style style:name="P16" style:parent-style-name="Textbody" style:family="paragraph">
      <style:paragraph-properties fo:text-align="center"/>
      <style:text-properties fo:font-size="24pt" style:font-size-asian="24pt"/>
    </style:style>
    <style:style style:name="P17" style:parent-style-name="Textbody" style:family="paragraph">
      <style:paragraph-properties fo:text-align="center"/>
      <style:text-properties fo:font-size="24pt" style:font-size-asian="24pt"/>
    </style:style>
    <style:style style:name="P18" style:parent-style-name="Textbody" style:family="paragraph">
      <style:paragraph-properties fo:text-align="center"/>
      <style:text-properties fo:font-size="24pt" style:font-size-asian="24pt"/>
    </style:style>
    <style:style style:name="P19" style:parent-style-name="ContentsHeading" style:family="paragraph">
      <style:paragraph-properties>
        <style:tab-stops>
          <style:tab-stop style:type="right" style:leader-style="dotted" style:leader-text="." style:position="6.925in"/>
        </style:tab-stops>
      </style:paragraph-properties>
    </style:style>
    <style:style style:name="P20" style:parent-style-name="Standard" style:family="paragraph">
      <style:paragraph-properties fo:line-height="200%" fo:text-indent="0.5in"/>
    </style:style>
    <style:style style:name="T21" style:parent-style-name="Car.predefinitoparagrafo" style:family="text">
      <style:text-properties fo:font-style="italic" style:font-style-asian="italic" style:font-style-complex="italic"/>
    </style:style>
    <style:style style:name="P22" style:parent-style-name="Standard" style:family="paragraph">
      <style:paragraph-properties fo:line-height="200%" fo:text-indent="0.5in"/>
    </style:style>
    <style:style style:name="P23" style:parent-style-name="Standard" style:family="paragraph">
      <style:paragraph-properties fo:line-height="200%"/>
    </style:style>
    <style:style style:name="P24" style:parent-style-name="Standard" style:family="paragraph">
      <style:paragraph-properties fo:line-height="200%"/>
    </style:style>
    <style:style style:name="P25" style:parent-style-name="Standard" style:family="paragraph">
      <style:paragraph-properties fo:line-height="200%"/>
    </style:style>
    <style:style style:name="P26" style:parent-style-name="Standard" style:family="paragraph">
      <style:paragraph-properties fo:line-height="200%"/>
    </style:style>
    <style:style style:name="P27" style:parent-style-name="Standard" style:family="paragraph">
      <style:paragraph-properties fo:line-height="200%"/>
    </style:style>
    <style:style style:name="P28" style:parent-style-name="Standard" style:family="paragraph">
      <style:paragraph-properties fo:line-height="200%"/>
    </style:style>
    <style:style style:name="P29" style:parent-style-name="Standard" style:family="paragraph">
      <style:paragraph-properties fo:line-height="200%"/>
    </style:style>
    <style:style style:name="P30" style:parent-style-name="TableContents" style:family="paragraph">
      <style:paragraph-properties fo:line-height="200%"/>
    </style:style>
    <style:style style:name="P31" style:parent-style-name="TableContents" style:family="paragraph">
      <style:paragraph-properties fo:line-height="200%"/>
    </style:style>
    <style:style style:name="P32" style:parent-style-name="TableContents" style:family="paragraph">
      <style:paragraph-properties fo:line-height="200%"/>
    </style:style>
    <style:style style:name="P33" style:parent-style-name="TableContents" style:family="paragraph">
      <style:paragraph-properties fo:line-height="200%"/>
    </style:style>
    <style:style style:name="P34" style:parent-style-name="TableContents" style:family="paragraph">
      <style:paragraph-properties fo:line-height="200%"/>
    </style:style>
    <style:style style:name="P35" style:parent-style-name="TableContents" style:family="paragraph">
      <style:paragraph-properties fo:line-height="200%"/>
    </style:style>
    <style:style style:name="P36" style:parent-style-name="Standard" style:family="paragraph">
      <style:paragraph-properties fo:line-height="200%"/>
    </style:style>
    <style:style style:name="P37" style:parent-style-name="Standard" style:family="paragraph">
      <style:paragraph-properties fo:line-height="200%"/>
    </style:style>
    <style:style style:name="P38" style:parent-style-name="Standard" style:family="paragraph">
      <style:paragraph-properties fo:line-height="200%"/>
    </style:style>
    <style:style style:name="P39" style:parent-style-name="Standard" style:family="paragraph">
      <style:paragraph-properties fo:line-height="200%"/>
    </style:style>
    <style:style style:name="P40" style:parent-style-name="Standard" style:family="paragraph">
      <style:paragraph-properties fo:line-height="200%"/>
    </style:style>
    <style:style style:name="P41" style:parent-style-name="Standard" style:family="paragraph">
      <style:paragraph-properties fo:line-height="200%"/>
    </style:style>
    <style:style style:name="P42" style:parent-style-name="Standard" style:family="paragraph">
      <style:paragraph-properties fo:line-height="200%"/>
    </style:style>
    <style:style style:name="P43" style:parent-style-name="Standard" style:family="paragraph">
      <style:paragraph-properties fo:line-height="200%"/>
    </style:style>
    <style:style style:name="P44" style:parent-style-name="Standard" style:family="paragraph">
      <style:paragraph-properties fo:line-height="200%"/>
    </style:style>
    <style:style style:name="P45" style:parent-style-name="Standard" style:family="paragraph">
      <style:paragraph-properties fo:line-height="200%"/>
    </style:style>
    <style:style style:name="P46" style:parent-style-name="Standard" style:family="paragraph">
      <style:paragraph-properties fo:line-height="200%"/>
    </style:style>
    <style:style style:name="P47" style:parent-style-name="Standard" style:family="paragraph">
      <style:paragraph-properties fo:line-height="200%"/>
    </style:style>
    <style:style style:name="P48" style:parent-style-name="Standard" style:family="paragraph">
      <style:paragraph-properties fo:line-height="200%"/>
    </style:style>
    <style:style style:name="P49" style:parent-style-name="Standard" style:family="paragraph">
      <style:paragraph-properties fo:line-height="200%"/>
    </style:style>
    <style:style style:name="P50" style:parent-style-name="Standard" style:family="paragraph">
      <style:paragraph-properties fo:line-height="200%"/>
    </style:style>
    <style:style style:name="P51" style:parent-style-name="Standard" style:family="paragraph">
      <style:paragraph-properties fo:line-height="200%"/>
    </style:style>
    <style:style style:name="P52" style:parent-style-name="Standard" style:family="paragraph">
      <style:paragraph-properties fo:line-height="200%"/>
    </style:style>
    <style:style style:name="P53" style:parent-style-name="Standard" style:family="paragraph">
      <style:paragraph-properties fo:line-height="200%"/>
      <style:text-properties fo:color="#FF0000"/>
    </style:style>
    <style:style style:name="T54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55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56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57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58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59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60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61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P62" style:parent-style-name="Textbody" style:family="paragraph">
      <style:paragraph-properties>
        <style:tab-stops>
          <style:tab-stop style:type="left" style:position="4.5437in"/>
        </style:tab-stops>
      </style:paragraph-properties>
    </style:style>
    <style:style style:name="T63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64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65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66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67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68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P69" style:parent-style-name="Textbody" style:family="paragraph"/>
    <style:style style:name="P70" style:parent-style-name="Textbody" style:family="paragraph">
      <style:paragraph-properties fo:margin-left="0.4923in">
        <style:tab-stops/>
      </style:paragraph-properties>
    </style:style>
    <style:style style:name="P71" style:parent-style-name="Textbody" style:family="paragraph"/>
    <style:style style:name="P72" style:parent-style-name="Textbody" style:family="paragraph"/>
    <style:style style:name="P73" style:parent-style-name="Textbody" style:family="paragraph"/>
    <style:style style:name="P74" style:parent-style-name="Textbody" style:family="paragraph">
      <style:paragraph-properties fo:margin-left="0.4923in">
        <style:tab-stops/>
      </style:paragraph-properties>
    </style:style>
    <style:style style:name="P75" style:parent-style-name="Textbody" style:family="paragraph"/>
    <style:style style:name="P76" style:parent-style-name="Textbody" style:family="paragraph">
      <style:paragraph-properties fo:margin-left="0.4923in">
        <style:tab-stops/>
      </style:paragraph-properties>
    </style:style>
    <style:style style:name="P77" style:parent-style-name="Textbody" style:family="paragraph">
      <style:paragraph-properties fo:margin-left="0.4923in">
        <style:tab-stops/>
      </style:paragraph-properties>
    </style:style>
    <style:style style:name="P78" style:parent-style-name="Textbody" style:family="paragraph">
      <style:paragraph-properties fo:margin-left="0.5in">
        <style:tab-stops/>
      </style:paragraph-properties>
    </style:style>
    <style:style style:name="P79" style:parent-style-name="Textbody" style:family="paragraph">
      <style:paragraph-properties fo:margin-left="0.5in">
        <style:tab-stops/>
      </style:paragraph-properties>
    </style:style>
    <style:style style:name="P80" style:parent-style-name="Textbody" style:family="paragraph">
      <style:paragraph-properties fo:margin-left="0.5in">
        <style:tab-stops/>
      </style:paragraph-properties>
    </style:style>
    <style:style style:name="P81" style:parent-style-name="Textbody" style:family="paragraph">
      <style:paragraph-properties fo:margin-left="0.25in">
        <style:tab-stops/>
      </style:paragraph-properties>
    </style:style>
    <style:style style:family="graphic" style:name="a12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  <style:style style:family="graphic" style:name="a7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oftware Design Documents</text:p>
      <text:p text:style-name="P2"/>
      <text:p text:style-name="P3">Version 1.0</text:p>
      <text:p text:style-name="P4">24 Aprile</text:p>
      <text:p text:style-name="P5">Diagnostica dei Sistemi Fisici</text:p>
      <text:p text:style-name="P6">Picasso Ratto Andrea</text:p>
      <text:p text:style-name="P7">3961894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h text:style-name="Titolo1" text:outline-level="1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9">Table of Contents</text:p>
          <text:p text:style-name="Contents1"><text:a xlink:href="#__RefHeading___Toc2872_1143973977" office:target-frame-name="_top" xlink:show="replace">1 Introduction<text:tab/>2</text:a></text:p>
          <text:p text:style-name="Contents1"><text:a xlink:href="#__RefHeading___Toc2874_1143973977" office:target-frame-name="_top" xlink:show="replace">2 System Overview<text:tab/>2</text:a></text:p>
          <text:p text:style-name="Contents1"><text:a xlink:href="#__RefHeading___Toc2876_1143973977" office:target-frame-name="_top" xlink:show="replace">3 Models<text:tab/>2</text:a></text:p>
          <text:p text:style-name="Contents2"><text:a xlink:href="#__RefHeading___Toc2878_1143973977" office:target-frame-name="_top" xlink:show="replace">3.1 Static Models<text:tab/>2</text:a></text:p>
          <text:p text:style-name="Contents3"><text:a xlink:href="#__RefHeading___Toc2880_1143973977" office:target-frame-name="_top" xlink:show="replace">3.1.1 Use Cases Diagram<text:tab/>2</text:a><text:line-break/><text:a xlink:href="#__RefHeading___Toc2882_1143973977" office:target-frame-name="_top" xlink:show="replace">3.1.2 Class Diagram<text:tab/>2</text:a><text:line-break/><text:a xlink:href="#__RefHeading___Toc2884_1143973977" office:target-frame-name="_top" xlink:show="replace">3.1.3 Object Diagram<text:tab/>2</text:a></text:p>
          <text:p text:style-name="Contents2"><text:a xlink:href="#__RefHeading___Toc2886_1143973977" office:target-frame-name="_top" xlink:show="replace">3.2 Dynamic Models<text:tab/>2</text:a></text:p>
          <text:p text:style-name="Contents3"><text:a xlink:href="#__RefHeading___Toc2888_1143973977" office:target-frame-name="_top" xlink:show="replace">3.2.1 Sequence Diagrams<text:tab/>2</text:a></text:p>
          <text:p text:style-name="Contents3"><text:a xlink:href="#__RefHeading___Toc2890_1143973977" office:target-frame-name="_top" xlink:show="replace">3.2.2 Activity Diagrams<text:tab/>2</text:a></text:p>
          <text:p text:style-name="Contents3"><text:a xlink:href="#__RefHeading___Toc2892_1143973977" office:target-frame-name="_top" xlink:show="replace">3.2.3 State Machine Diagrams<text:tab/>2</text:a></text:p>
          <text:p text:style-name="Contents2"><text:a xlink:href="#__RefHeading___Toc2886_1143973977" office:target-frame-name="_top" xlink:show="replace">3.2 Vincoli aggiuntivi<text:tab/>2</text:a></text:p>
          <text:p text:style-name="Contents3"/>
          <text:p text:style-name="Contents3"/>
        </text:index-body>
      </text:table-of-content>
      <text:h text:style-name="Titolo1" text:outline-level="1"/>
      <text:h text:style-name="Titolo1" text:outline-level="1"><text:bookmark-start text:name="__RefHeading___Toc2872_1143973977"/>1 Introduction<text:bookmark-end text:name="__RefHeading___Toc2872_1143973977"/></text:h>
      <text:h text:style-name="Titolo1" text:outline-level="1">2 System Overview</text:h>
      <text:p text:style-name="P20">Lo scopo del progetto è quello di descrivere tramite un insieme di modelli UML il “Software per<text:s/>Diagnostica dei sistemi fisici<text:s/><text:span text:style-name="T21">”</text:span>, riferimento al documento “srs_p2_Picasso_Ratto_Andrea.odt”. In questa prima versione, rispetto al sistema descritto in XXX, si eseguono le seguenti semplificazioni:</text:p>
      <text:p text:style-name="P22"/>
      <text:list text:style-name="LFO1" text:continue-numbering="true">
        <text:list-item>
          <text:p text:style-name="P23">Al fine di elliminare la parte back-end si rimuove la funzionalità del salvataggio, perciò I seguenti use case vengono elliminati</text:p>
          <text:list text:continue-numbering="true">
            <text:list-item>
              <text:p text:style-name="P24">Importa regola UC2</text:p>
            </text:list-item>
            <text:list-item>
              <text:p text:style-name="P25">Salva Regola<text:tab/>UC4</text:p>
            </text:list-item>
            <text:list-item>
              <text:p text:style-name="P26">Apri regola Salvata UC5</text:p>
            </text:list-item>
          </text:list>
        </text:list-item>
      </text:list>
      <text:p text:style-name="P27"/>
      <text:list text:style-name="LFO1" text:continue-numbering="true">
        <text:list-item>
          <text:p text:style-name="P28">L’eliminazione del salvataggio causa la modifica dei seguenti Use Case:</text:p>
          <text:list text:continue-numbering="true">
            <text:list-item>
              <text:p text:style-name="P29">UC24 Chiudi foglio di lavoro (No controlli foglio di lavoro salvato)</text:p>
              <text:list text:continue-numbering="true">
                <text:list-item>
                  <text:p text:style-name="P30">Il manutentore seleziona l’opzione “Chiudi foglio di lavoro”</text:p>
                </text:list-item>
                <text:list-item>
                  <text:p text:style-name="P31">Il sistema chiude il foglio di lavoro aperto che quindi non risulta più visibile nell’editor grafico</text:p>
                </text:list-item>
              </text:list>
            </text:list-item>
            <text:list-item>
              <text:p text:style-name="P32">UC1 Crea regola</text:p>
              <text:list text:continue-numbering="true">
                <text:list-item>
                  <text:p text:style-name="P33">No scenario alternativo 4a “Nome inserito gia esistente”</text:p>
                </text:list-item>
              </text:list>
            </text:list-item>
            <text:list-item>
              <text:p text:style-name="P34">UC8 Crea Operatore Complesso</text:p>
              <text:list text:continue-numbering="true">
                <text:list-item>
                  <text:p text:style-name="P35">No scenario alternativo 4a “Nome inserito gia esistente”<text:line-break/></text:p>
                </text:list-item>
              </text:list>
            </text:list-item>
          </text:list>
        </text:list-item>
        <text:list-item>
          <text:p text:style-name="P36">La fuzionalita “annulla” al momento dell’inserimento Input/Output e settaggio parametri è considerata superflua in una prima versione, perciò I seguenti Use Case vengono<text:s/>così modificati:</text:p>
          <text:list text:continue-numbering="true">
            <text:list-item>
              <text:p text:style-name="P37">UC3 Esporta Regola</text:p>
              <text:list text:continue-numbering="true">
                <text:list-item>
                  <text:p text:style-name="P38">No scenario alternativo 4a “Il Manutentore annulla l’operazione”</text:p>
                </text:list-item>
              </text:list>
            </text:list-item>
            <text:list-item>
              <text:p text:style-name="P39">UC15 <text:s/>Aggiungi porta operatore complesso</text:p>
            </text:list-item>
          </text:list>
        </text:list-item>
      </text:list>
      <text:list text:style-name="LFO2" text:continue-numbering="true">
        <text:list-item>
          <text:list>
            <text:list-item>
              <text:list>
                <text:list-item>
                  <text:p text:style-name="P40">No scenario alternativo 3a “Il Manutentore annulla l’operazione”</text:p>
                </text:list-item>
              </text:list>
            </text:list-item>
            <text:list-item>
              <text:p text:style-name="P41">UC20 Setta parametri operatore elementare</text:p>
            </text:list-item>
          </text:list>
        </text:list-item>
      </text:list>
      <text:list text:style-name="LFO3" text:continue-numbering="true">
        <text:list-item>
          <text:list>
            <text:list-item>
              <text:list>
                <text:list-item>
                  <text:p text:style-name="P42">No scenario alternativo 5a “Il Manutentore annulla l’operazione”</text:p>
                </text:list-item>
              </text:list>
            </text:list-item>
          </text:list>
        </text:list-item>
      </text:list>
      <text:p text:style-name="P43"/>
      <text:list text:style-name="LFO1" text:continue-numbering="true">
        <text:list-item>
          <text:p text:style-name="P44">L’utilizzo della libreria “JOINT JS” ci vincola alle seguenti modifiche:</text:p>
        </text:list-item>
      </text:list>
      <text:list text:style-name="LFO4" text:continue-numbering="true">
        <text:list-item>
          <text:list>
            <text:list-item>
              <text:p text:style-name="P45">Elliminazione UC16 Rimuovi porta operatore complesso</text:p>
            </text:list-item>
            <text:list-item>
              <text:p text:style-name="P46">Modifica UC17 Aggiungi connessione operatori</text:p>
            </text:list-item>
          </text:list>
        </text:list-item>
      </text:list>
      <text:list text:style-name="LFO5" text:continue-numbering="true">
        <text:list-item>
          <text:list>
            <text:list-item>
              <text:list>
                <text:list-item>
                  <text:p text:style-name="P47">Rimozione punto 1: Il manutentore seleziona il wire per collegare i blocchetti</text:p>
                </text:list-item>
              </text:list>
            </text:list-item>
            <text:list-item>
              <text:p text:style-name="P48">La libreria consente di mettere operatori sovrapposti perciò l’UC13 viene modificato:</text:p>
            </text:list-item>
          </text:list>
        </text:list-item>
      </text:list>
      <text:list text:style-name="LFO6" text:continue-numbering="true">
        <text:list-item>
          <text:list>
            <text:list-item>
              <text:list>
                <text:list-item>
                  <text:p text:style-name="P49">Rimozione punto 2a: Il manutentore rilascia il blocchetto in un punto del foglio di lavoro non libero<text:line-break/></text:p>
                </text:list-item>
              </text:list>
            </text:list-item>
          </text:list>
        </text:list-item>
        <text:list-item>
          <text:p text:style-name="P50">Al fine<text:s/>semplificare I controlli di correttezza in una prima versione si effettuano le seguenti semplificazioni sul progetto</text:p>
        </text:list-item>
      </text:list>
      <text:list text:style-name="LFO7" text:continue-numbering="true">
        <text:list-item>
          <text:list>
            <text:list-item>
              <text:p text:style-name="P51">I casi di studio della molteplicità risultano essere: tutti i segnali con molteplicità 1, tutti i segnali con molteplicità N, alcuni segnali di molteplicità 1 ed altri di molteplicità N. Nel semplificare il progetto consideriamo non ammissibile l’ultima opzione</text:p>
            </text:list-item>
            <text:list-item>
              <text:p text:style-name="P52">La prima versione del progetto non effettuerà controlli su eventuali retroazioni</text:p>
            </text:list-item>
          </text:list>
        </text:list-item>
      </text:list>
      <text:p text:style-name="P53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Titolo1" text:outline-level="1"><text:bookmark-start text:name="__RefHeading___Toc2876_1143973977"/><text:soft-page-break/>3 Models<text:bookmark-end text:name="__RefHeading___Toc2876_1143973977"/></text:h>
      <text:h text:style-name="Titolo2" text:outline-level="2"><text:bookmark-start text:name="__RefHeading___Toc2878_1143973977"/>3.1 Static Models<text:bookmark-end text:name="__RefHeading___Toc2878_1143973977"/></text:h>
      <text:h text:style-name="Titolo3" text:outline-level="3"><text:bookmark-start text:name="__RefHeading___Toc2880_1143973977"/>3.1.1<text:s/>Use Cases Diagram<text:bookmark-end text:name="__RefHeading___Toc2880_1143973977"/></text:h>
      <text:p text:style-name="Textbody"/>
      <text:p text:style-name="Textbody"/>
      <text:p text:style-name="Textbody"><text:span text:style-name="T54"><draw:frame draw:style-name="a0" draw:name="Immagine 1" text:anchor-type="as-char" svg:x="0in" svg:y="0in" svg:width="6.69306in" svg:height="6.25903in" style:rel-width="scale" style:rel-height="scale"><draw:image xlink:href="media/image1.png" xlink:type="simple" xlink:show="embed" xlink:actuate="onLoad"/><svg:title/><svg:desc>C:\Users\Utente\Desktop\ProgettoSE\DiagrammaCasiD'uso.png</svg:desc></draw:frame></text:span><text:bookmark-start text:name="__RefHeading___Toc2882_1143973977"/></text:p>
      <text:soft-page-break/>
      <text:h text:style-name="Titolo3" text:outline-level="3">3.1.2 Class Diagram<text:bookmark-end text:name="__RefHeading___Toc2882_1143973977"/></text:h>
      <text:h text:style-name="Titolo3" text:outline-level="3"><text:bookmark-start text:name="__RefHeading___Toc2884_1143973977"/><text:span text:style-name="T55"><draw:frame draw:z-index="251672576" draw:style-name="a1" draw:name="Immagine 14" text:anchor-type="paragraph" svg:x="-0.74931in" svg:y="0.34722in" svg:width="8.17292in" svg:height="7.61528in" style:rel-width="scale" style:rel-height="scale"><draw:image xlink:href="media/image2.png" xlink:type="simple" xlink:show="embed" xlink:actuate="onLoad"/><svg:title/><svg:desc>C:\Users\Utente\Desktop\ProgettoSE\Diagramma_classi.png</svg:desc></draw:frame></text:span></text:h>
      <text:h text:style-name="Titolo3" text:outline-level="3"/>
      <text:h text:style-name="Titolo3" text:outline-level="3"/>
      <text:h text:style-name="Titolo3" text:outline-level="3"/>
      <text:p text:style-name="Textbody"/>
      <text:soft-page-break/>
      <text:h text:style-name="Titolo3" text:outline-level="3"><text:span text:style-name="T56"><draw:frame draw:z-index="251660288" draw:style-name="a2" draw:name="Immagine 3" text:anchor-type="paragraph" svg:x="-0.62083in" svg:y="0.98333in" svg:width="7.9375in" svg:height="7.47917in" style:rel-width="scale" style:rel-height="scale"><draw:image xlink:href="media/image3.png" xlink:type="simple" xlink:show="embed" xlink:actuate="onLoad"/><svg:title/><svg:desc>C:\Users\Utente\Desktop\ProgettoSE\DiagrammaOggettiRegola.png</svg:desc></draw:frame></text:span>3.1.3 Object Diagram<text:bookmark-end text:name="__RefHeading___Toc2884_1143973977"/><text:line-break/><text:line-break/>Diagramma a Oggetti Regola</text:h>
      <text:h text:style-name="Titolo2" text:outline-level="2"><text:bookmark-start text:name="__RefHeading___Toc2886_1143973977"/>3.2 Dynamic Models<text:bookmark-start text:name="__RefHeading___Toc2888_1143973977"/><text:bookmark-end text:name="__RefHeading___Toc2886_1143973977"/></text:h>
      <text:h text:style-name="Titolo3" text:outline-level="3"/>
      <text:h text:style-name="Titolo3" text:outline-level="3"/>
      <text:h text:style-name="Titolo3" text:outline-level="3"/>
      <text:soft-page-break/>
      <text:h text:style-name="Titolo3" text:outline-level="3">3.2.1 Sequence Diagrams<text:bookmark-end text:name="__RefHeading___Toc2888_1143973977"/><text:line-break/><text:line-break/>Diagramma di Sequenza Aggiungi Connessione Operatori<text:line-break/><text:line-break/></text:h>
      <text:p text:style-name="Textbody"><text:span text:style-name="T57"><draw:frame draw:z-index="251661312" draw:style-name="a3" draw:name="Immagine 4" text:anchor-type="paragraph" svg:x="-0.67292in" svg:y="0.22361in" svg:width="8.03125in" svg:height="7.42708in" style:rel-width="scale" style:rel-height="scale"><draw:image xlink:href="media/image4.png" xlink:type="simple" xlink:show="embed" xlink:actuate="onLoad"/><svg:title/><svg:desc>C:\Users\Utente\Desktop\ProgettoSE\DiagrammaSequenzaAggiungiConnessioneOperatori.png</svg:desc></draw:frame></text:span></text:p>
      <text:h text:style-name="Titolo3" text:outline-level="3"/>
      <text:h text:style-name="Titolo3" text:outline-level="3"><text:span text:style-name="T58"><draw:frame draw:z-index="251663360" draw:style-name="a4" draw:name="Immagine 6" text:anchor-type="paragraph" svg:x="-0.40208in" svg:y="5.08611in" svg:width="7.61458in" svg:height="4.60417in" style:rel-width="scale" style:rel-height="scale"><draw:image xlink:href="media/image5.png" xlink:type="simple" xlink:show="embed" xlink:actuate="onLoad"/><svg:title/><svg:desc>C:\Users\Utente\Desktop\ProgettoSE\DiagrammaSequenzaControllaCorrettezzaOperatoreComplesso.png</svg:desc></draw:frame></text:span><text:span text:style-name="T59"><draw:frame draw:z-index="251662336" draw:style-name="a5" draw:name="Immagine 5" text:anchor-type="paragraph" svg:x="-0.42292in" svg:y="0.68333in" svg:width="7.44792in" svg:height="3.65625in" style:rel-width="scale" style:rel-height="scale"><draw:image xlink:href="media/image6.png" xlink:type="simple" xlink:show="embed" xlink:actuate="onLoad"/><svg:title/><svg:desc>C:\Users\Utente\Desktop\ProgettoSE\DiagrammaSequenzaAggiungiOperatore.png</svg:desc></draw:frame></text:span>Diagramma di Sequenza Aggiungi Operatore<text:line-break/><text:line-break/><text:line-break/>Diagramma di Sequenza Controlla Correttezza Operatore Complesso<text:line-break/><text:soft-page-break/><text:line-break/>Diagramma di Sequenza Crea Regola</text:h>
      <text:p text:style-name="Textbody"><text:span text:style-name="T60"><draw:frame draw:z-index="251664384" draw:style-name="a6" draw:name="Immagine 7" text:anchor-type="paragraph" svg:x="0in" svg:y="0.22233in" svg:width="7.88542in" svg:height="3.34375in" style:rel-width="scale" style:rel-height="scale"><draw:image xlink:href="media/image7.png" xlink:type="simple" xlink:show="embed" xlink:actuate="onLoad"/><svg:title/><svg:desc>C:\Users\Utente\Desktop\ProgettoSE\DiagrammaSequenzaCreaRegola.png</svg:desc></draw:frame></text:span></text:p>
      <text:p text:style-name="Textbody"/>
      <text:h text:style-name="Titolo3" text:outline-level="3"><text:bookmark-start text:name="__RefHeading___Toc2890_1143973977"/>Diagramma di Sequenza Rimuovi Operatore</text:h>
      <text:p text:style-name="Textbody"><text:span text:style-name="T61"><draw:frame draw:z-index="251671552" draw:style-name="a7" draw:name="Immagine 14" text:anchor-type="paragraph" svg:x="-0.52847in" svg:y="0.32778in" svg:width="7.66319in" svg:height="4.66319in" style:rel-width="scale" style:rel-height="scale"><draw:image xlink:href="media/image8.png" xlink:type="simple" xlink:show="embed" xlink:actuate="onLoad"/><svg:title/><svg:desc>C:\Users\Utente\Desktop\ConsegnaSE\sdd\DiagrammaSequenzaRimuoviOperatore.png</svg:desc></draw:frame></text:span></text:p>
      <text:p text:style-name="Textbody"/>
      <text:p text:style-name="Textbody"/>
      <text:p text:style-name="P62"><text:span text:style-name="T63"><draw:frame draw:z-index="251665408" draw:style-name="a8" draw:name="Immagine 8" text:anchor-type="paragraph" svg:x="-0.50625in" svg:y="1.20139in" svg:width="7.75in" svg:height="7.63542in" style:rel-width="scale" style:rel-height="scale"><draw:image xlink:href="media/image9.png" xlink:type="simple" xlink:show="embed" xlink:actuate="onLoad"/><svg:title/><svg:desc>C:\Users\Utente\Desktop\ProgettoSE\DiagrammaAttivitaAggiungiOperatore.png</svg:desc></draw:frame></text:span>3.2.2 Activity Diagrams<text:bookmark-end text:name="__RefHeading___Toc2890_1143973977"/><text:line-break/><text:line-break/>Diagramma di Attività Aggiungi Operatore<text:line-break/><text:line-break/></text:p>
      <text:p text:style-name="Textbody"/>
      <text:p text:style-name="Textbody"/>
      <text:h text:style-name="Titolo3" text:outline-level="3"><text:bookmark-start text:name="__RefHeading___Toc2892_1143973977"/><text:soft-page-break/><text:span text:style-name="T64"><draw:frame draw:z-index="251666432" draw:style-name="a9" draw:name="Immagine 9" text:anchor-type="paragraph" svg:x="-0.57917in" svg:y="0.54583in" svg:width="7.88542in" svg:height="5.45833in" style:rel-width="scale" style:rel-height="scale"><draw:image xlink:href="media/image10.png" xlink:type="simple" xlink:show="embed" xlink:actuate="onLoad"/><svg:title/><svg:desc>C:\Users\Utente\Desktop\ProgettoSE\DiagrammaAttivitàAggiungiConessioneOperatori.png</svg:desc></draw:frame></text:span>Diagramma di Attività Aggiungi Connessione<text:s/>Operatori<text:line-break/><text:line-break/></text:h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soft-page-break/>
      <text:h text:style-name="Titolo3" text:outline-level="3"><text:span text:style-name="T65"><draw:frame draw:z-index="251667456" draw:style-name="a10" draw:name="Immagine 10" text:anchor-type="paragraph" svg:x="0in" svg:y="0.61458in" svg:width="8.0625in" svg:height="9.46875in" style:rel-width="scale" style:rel-height="scale"><draw:image xlink:href="media/image11.png" xlink:type="simple" xlink:show="embed" xlink:actuate="onLoad"/><svg:title/><svg:desc>C:\Users\Utente\Desktop\ProgettoSE\DiagrammaAttivitàAggiungiOperatoreIORegola.png</svg:desc></draw:frame></text:span>Diagramma di Attività Aggiungi Operatore IORegola<text:line-break/><text:span text:style-name="T66"><text:s/></text:span></text:h>
      <text:soft-page-break/>
      <text:h text:style-name="Titolo3" text:outline-level="3"><text:span text:style-name="T67"><draw:frame draw:z-index="251668480" draw:style-name="a11" draw:name="Immagine 15" text:anchor-type="paragraph" svg:x="-0.52708in" svg:y="0.54583in" svg:width="7.80208in" svg:height="6.58264in" style:rel-width="scale" style:rel-height="scale"><draw:image xlink:href="media/image12.png" xlink:type="simple" xlink:show="embed" xlink:actuate="onLoad"/><svg:title/><svg:desc>C:\Users\Utente\Desktop\ProgettoSE\DiagrammaAttivitàCreaRegola.png</svg:desc></draw:frame></text:span>Diagramma di Attività Crea Regola<text:line-break/></text:h>
      <text:h text:style-name="Titolo3" text:outline-level="3"/>
      <text:p text:style-name="Textbody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><text:line-break/><text:line-break/><text:line-break/><text:line-break/><text:soft-page-break/>3.2.3 State Machine Diagrams<text:bookmark-end text:name="__RefHeading___Toc2892_1143973977"/><text:line-break/>Diagramma Macchine a Stati Regola</text:h>
      <text:p text:style-name="Textbody"><text:span text:style-name="T68"><draw:frame draw:z-index="251669504" draw:style-name="a12" draw:name="Immagine 16" text:anchor-type="paragraph" svg:x="-0.6625in" svg:y="0.21875in" svg:width="7.77569in" svg:height="9.125in" style:rel-width="scale" style:rel-height="scale"><draw:image xlink:href="media/image13.png" xlink:type="simple" xlink:show="embed" xlink:actuate="onLoad"/><svg:title/><svg:desc>C:\Users\Utente\Desktop\ProgettoSE\DiagrammaMacchineStatiRegola.png</svg:desc></draw:frame></text:span></text:p>
      <text:soft-page-break/>
      <text:h text:style-name="Titolo3" text:outline-level="3">4.1 Vincoli Aggiuntivi</text:h>
      <text:list text:style-name="LFO8" text:continue-numbering="true">
        <text:list-item>
          <text:p text:style-name="P69">Ogni Link deve connettere dati compatibili:</text:p>
        </text:list-item>
      </text:list>
      <text:p text:style-name="P70">Context Link:<text:line-break/>inv: self.getSourceElement().getPort(self.attribute.source.port.id).tipo== self.getTargetElement().getPort(self.attribute.target.port.id).tipo;</text:p>
      <text:list text:style-name="LFO8" text:continue-numbering="true">
        <text:list-item>
          <text:p text:style-name="P71">Ogni Regola deve avere almeno un blocchetto di ingresso e uno di uscita:<text:line-break/><text:line-break/>Context:<text:s/>FoglioDiLavoroRegola:<text:line-break/>inv: self.Paper.Model.getSinks()!=null and self.Paper.Model.getSources()!=null</text:p>
        </text:list-item>
        <text:list-item>
          <text:p text:style-name="P72">Prima di poter creare un nuovo Operatore complesso non devono essere presenti fogli di lavoro aperti nell’editor.<text:line-break/><text:line-break/>Context:: nuovoOpComplesso():<text:line-break/>pre: self.getFoglioLavoro==null;</text:p>
        </text:list-item>
        <text:list-item>
          <text:p text:style-name="P73">Prima di poter creare una nuova Regola non devono essere presenti fogli di lavoro aperti nell’editor.</text:p>
        </text:list-item>
      </text:list>
      <text:p text:style-name="P74"><text:line-break/>Context Editor:: nuovaRegola():<text:line-break/>pre: self.getFoglioLavoro==null;</text:p>
      <text:list text:style-name="LFO8" text:continue-numbering="true">
        <text:list-item>
          <text:p text:style-name="P75">I parametri di un operatore semplice (se ne possiede) alla creazione sono <text:s/>settati di default essi possono poi venir modificati dal manutentore.</text:p>
        </text:list-item>
      </text:list>
      <text:p text:style-name="P76">Context OperatoreSemplice:<text:line-break/>init: self.paramValue=default;<text:line-break/><text:line-break/>Vado ora a specificare i valori di default per i parametri per ciascun operatore semplice che ne possiede:</text:p>
      <text:p text:style-name="P77">Context OperatoreSemplice:<text:line-break/>init: self.nome=’Costante’ implies self.hasParam==true implies self.paramValue=1;<text:line-break/>init: self.nome=’Contatore’ implies self.hasParam==true implies self.paramValue=false;<text:line-break/>init: self.nome=’Accumulatore’ implies self.hasParam==true implies self.paramValue=0;<text:line-break/>init: self.nome=’Media Mobile’ implies self.hasParam==true implies self.paramValue=0;<text:line-break/>init: self.nome=’Concatenatore’ implies self.hasParam==true implies self.paramValue=’ ‘;<text:line-break/>init: self.nome=’Aggregatore’ implies self.hasParam==true implies self.paramValue=1;<text:line-break/>init: self.nome=’Convertitore reale/intero’ implies self.hasParam==true implies self.paramValue=true;<text:line-break/>init: self.nome=’Comparatore’ implies self.hasParam==false;<text:line-break/>init: self.nome=’Somma’ implies self.hasParam==false;<text:line-break/>init: self.nome=’Differenza’ implies self.hasParam==false;<text:line-break/>init: self.nome=’Integratore’ implies self.hasParam==false;<text:line-break/>init: self.nome=’Derivatore’ implies self.hasParam==false;<text:line-break/><text:soft-page-break/>init: self.nome=’AND logico’ implies self.hasParam==false;<text:line-break/>init: self.nome=’ORlogico’ implies self.hasParam==false;<text:line-break/>init: self.nome=’NOT logico’ implies self.hasParam==false;<text:line-break/>init: self.nome=’XOR logico’ implies self.hasParam==false;<text:line-break/>init: self.nome=’Disgregatore’ implies self.hasParam==false;<text:line-break/>init: self.nome=’Convertitore intero/reale’ implies self.hasParam==false;<text:line-break/>init: self.nome=’Convertitore string/reale’ implies self.hasParam==false;<text:line-break/>init: self.nome=’Convertitore reale/string’ implies self.hasParam==false;<text:line-break/></text:p>
      <text:p text:style-name="P78"/>
      <text:p text:style-name="P79"><text:line-break/></text:p>
      <text:p text:style-name="P80"/>
      <text:p text:style-name="Textbody"><text:tab/></text:p>
      <text:p text:style-name="P81"/>
      <text:p text:style-name="Textbody"/>
      <text:p text:style-name="Textbody"/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tarSymbol" style:font-charset="x-symbol" svg:font-family="StarSymbol" style:font-family-generic="system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stazione" style:display-name="Intestazione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IntestazioneCarattere" style:display-name="Intestazione Carattere" style:family="text" style:parent-style-name="Car.predefinitoparagrafo">
      <style:text-properties style:font-name-complex="Mangal" style:font-size-complex="10.5pt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tarSymbol" style:font-name-asian="OpenSymbol" style:font-name-complex="OpenSymbol"/>
    </style:style>
    <style:style style:name="WW_CharLFO2LVL1" style:family="text">
      <style:text-properties style:font-name="StarSymbol" style:font-name-asian="OpenSymbol" style:font-name-complex="OpenSymbol"/>
    </style:style>
    <style:style style:name="WW_CharLFO3LVL1" style:family="text">
      <style:text-properties style:font-name="StarSymbol" style:font-name-asian="OpenSymbol" style:font-name-complex="OpenSymbol"/>
    </style:style>
    <style:style style:name="WW_CharLFO4LVL1" style:family="text">
      <style:text-properties style:font-name="StarSymbol" style:font-name-asian="OpenSymbol" style:font-name-complex="OpenSymbol"/>
    </style:style>
    <style:style style:name="WW_CharLFO5LVL1" style:family="text">
      <style:text-properties style:font-name="StarSymbol" style:font-name-asian="OpenSymbol" style:font-name-complex="OpenSymbol"/>
    </style:style>
    <style:style style:name="WW_CharLFO6LVL1" style:family="text">
      <style:text-properties style:font-name="StarSymbol" style:font-name-asian="OpenSymbol" style:font-name-complex="OpenSymbol"/>
    </style:style>
    <style:style style:name="WW_CharLFO7LVL1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drea Picasso</dc:creator>
    <meta:creation-date>2017-04-24T11:49:00Z</meta:creation-date>
    <dc:date>2017-05-08T12:01:00Z</dc:date>
    <meta:template xlink:href="Normal" xlink:type="simple"/>
    <meta:editing-cycles>20</meta:editing-cycles>
    <meta:editing-duration>PT14880S</meta:editing-duration>
    <meta:document-statistic meta:page-count="17" meta:paragraph-count="13" meta:word-count="1002" meta:character-count="6704" meta:row-count="47" meta:non-whitespace-character-count="5715"/>
  </office:meta>
</office:document-meta>
</file>